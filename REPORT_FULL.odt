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, 'Liberation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, 'Liberation Serif', serif"/>
  </office:font-face-decls>
  <office:automatic-styles>
    <style:style style:name="Table1" style:family="table">
      <style:table-properties style:width="6.6118in" table:align="left"/>
    </style:style>
    <style:style style:name="Table1.A" style:family="table-column">
      <style:table-column-properties style:column-width="1.5479in"/>
    </style:style>
    <style:style style:name="Table1.B" style:family="table-column">
      <style:table-column-properties style:column-width="1.4354in"/>
    </style:style>
    <style:style style:name="Table1.C" style:family="table-column">
      <style:table-column-properties style:column-width="1.5889in"/>
    </style:style>
    <style:style style:name="Table1.D" style:family="table-column">
      <style:table-column-properties style:column-width="2.03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master-page-name="HTML">
      <style:paragraph-properties fo:margin-left="0in" fo:margin-right="0in" fo:margin-top="0in" fo:margin-bottom="0.8335in" style:contextual-spacing="false" fo:line-height="120%" fo:text-align="center" style:justify-single-word="false" fo:text-indent="0in" style:auto-text-indent="false" style:page-number="auto"/>
      <style:text-properties fo:text-transform="uppercase" fo:font-size="12pt" fo:font-weight="bold"/>
    </style:style>
    <style:style style:name="P2" style:family="paragraph" style:parent-style-name="Text_20_body">
      <style:paragraph-properties fo:margin-left="0in" fo:margin-right="0in" fo:margin-top="1.0417in" fo:margin-bottom="0.1043in" style:contextual-spacing="false" fo:text-align="center" style:justify-single-word="false" fo:text-indent="0in" style:auto-text-indent="false"/>
      <style:text-properties fo:font-size="20pt" fo:font-weight="bold"/>
    </style:style>
    <style:style style:name="P3" style:family="paragraph" style:parent-style-name="Text_20_body">
      <style:paragraph-properties fo:margin-left="0in" fo:margin-right="0in" fo:margin-top="0in" fo:margin-bottom="0.1563in" style:contextual-spacing="false" fo:text-align="center" style:justify-single-word="false" fo:text-indent="0in" style:auto-text-indent="false"/>
      <style:text-properties fo:font-size="14pt"/>
    </style:style>
    <style:style style:name="P4" style:family="paragraph" style:parent-style-name="Text_20_body">
      <style:paragraph-properties fo:margin-left="0in" fo:margin-right="0in" fo:margin-top="0in" fo:margin-bottom="1.25in" style:contextual-spacing="false" fo:line-height="130%" fo:text-align="center" style:justify-single-word="false" fo:text-indent="0in" style:auto-text-indent="false"/>
      <style:text-properties fo:font-size="18pt" fo:font-weight="bold"/>
    </style:style>
    <style:style style:name="P5" style:family="paragraph" style:parent-style-name="Text_20_body">
      <style:paragraph-properties fo:margin-left="0in" fo:margin-right="0in" fo:margin-top="0in" fo:margin-bottom="1.0417in" style:contextual-spacing="false" fo:line-height="140%" fo:text-align="start" style:justify-single-word="false" fo:text-indent="0in" style:auto-text-indent="false"/>
      <style:text-properties fo:font-size="14pt"/>
    </style:style>
    <style:style style:name="P6" style:family="paragraph" style:parent-style-name="Text_20_body">
      <style:paragraph-properties fo:margin-top="0in" fo:margin-bottom="1.0417in" style:contextual-spacing="false" fo:line-height="140%" fo:text-align="start" style:justify-single-word="false"/>
      <style:text-properties fo:font-size="14pt"/>
    </style:style>
    <style:style style:name="P7" style:family="paragraph" style:parent-style-name="Text_20_body">
      <style:paragraph-properties fo:margin-top="0in" fo:margin-bottom="1.0417in" style:contextual-spacing="false" fo:line-height="140%" fo:text-align="start" style:justify-single-word="false"/>
    </style:style>
    <style:style style:name="P8" style:family="paragraph" style:parent-style-name="Text_20_body">
      <style:paragraph-properties fo:margin-left="0in" fo:margin-right="0in" fo:margin-top="0.8335in" fo:margin-bottom="0.1252in" style:contextual-spacing="false" fo:text-align="center" style:justify-single-word="false" fo:text-indent="0in" style:auto-text-indent="false"/>
      <style:text-properties fo:font-size="12pt"/>
    </style:style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>
      <style:paragraph-properties fo:margin-left="0in" fo:margin-right="0in" fo:margin-top="0.1874in" fo:margin-bottom="0.0626in" style:contextual-spacing="false" fo:line-height="120%" fo:text-align="start" style:justify-single-word="false" fo:text-indent="0in" style:auto-text-indent="false"/>
      <style:text-properties fo:font-size="12pt" fo:font-weight="normal"/>
    </style:style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>
      <style:paragraph-properties fo:margin-left="0.4925in" fo:margin-right="0in" fo:margin-top="0in" fo:margin-bottom="0.1252in" style:contextual-spacing="false" fo:text-indent="0in" style:auto-text-indent="false"/>
      <style:text-properties fo:font-style="italic" loext:padding-left="0.1665in" loext:padding-right="0in" loext:padding-top="0in" loext:padding-bottom="0in" loext:border-left="2.24pt solid #000000" loext:border-right="none" loext:border-top="none" loext:border-bottom="none"/>
    </style:style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7">
      <style:paragraph-properties fo:margin-top="0in" fo:margin-bottom="0in" style:contextual-spacing="false"/>
    </style:style>
    <style:style style:name="P24" style:family="paragraph" style:parent-style-name="Text_20_body" style:list-style-name="L7"/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9">
      <style:paragraph-properties fo:margin-top="0in" fo:margin-bottom="0in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10">
      <style:paragraph-properties fo:margin-top="0in" fo:margin-bottom="0in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1">
      <style:paragraph-properties fo:margin-top="0in" fo:margin-bottom="0in" style:contextual-spacing="false"/>
    </style:style>
    <style:style style:name="P32" style:family="paragraph" style:parent-style-name="Text_20_body" style:list-style-name="L1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и науки Российской Федерации<text:line-break/>Государственное бюджетное образовательное учреждение<text:line-break/>Колледж информационных технологий и программирования </text:p>
      <text:p text:style-name="P2">КУРСОВОЙ ПРОЕКТ </text:p>
      <text:p text:style-name="P3">по междисциплинарному курсу МДК.01.01<text:line-break/>на тему: </text:p>
      <text:p text:style-name="P4">«Разработка модуля авторизации пользователей для веб-приложения» </text:p>
      <text:p text:style-name="P5">Выполнил студент группы ИТ-301</text:p>
      <text:p text:style-name="P6">Специальность 09.02.07</text:p>
      <text:p text:style-name="P6">____________ / И. И. Иванов</text:p>
      <text:p text:style-name="P7"/>
      <text:p text:style-name="P6">Руководитель проекта:</text:p>
      <text:p text:style-name="P6">преподаватель спец. дисциплин</text:p>
      <text:p text:style-name="P6">____________ / П. П. Петров</text:p>
      <text:p text:style-name="P8">Москва, 2026 </text:p>
      <text:p text:style-name="Heading_20_1"><text:soft-page-break/>Введение</text:p>
      <text:p text:style-name="Text_20_body">В современных распределенных информационных системах и веб-приложениях процессы аутентификации и авторизации пользователей выступают в роли фундаментальных элементов обеспечения комплексной безопасности. Эффективное разграничение прав доступа, предотвращение несанкционированных воздействий и защита конфиденциальности пользовательских данных являются критически важными требованиями при проектировании бэкенд-инфраструктуры распределенных программных комплексов.</text:p>
      <text:p text:style-name="Text_20_body">Объектом исследования в рамках данной курсовой работы являются механизмы контроля доступа и аутентификации в клиент-серверных веб-интерфейсах. Предметом исследования является программная реализация защищенного микросервисного модуля авторизации.</text:p>
      <text:p text:style-name="Text_20_body">Целью курсовой работы является проектирование, программная реализация и комплексное тестирование высокопроизводительного, отказоустойчивого и масштабируемого модуля авторизации на базе микросервисной архитектуры с использованием современных стандартов безопасности.</text:p>
      <text:p text:style-name="Text_20_body">Для достижения поставленной цели в рамках проекта были сформулированы и решены следующие задачи:</text:p>
      <text:list text:style-name="L1">
        <text:list-item>
          <text:p text:style-name="P9">Изучить функциональные и нефункциональные требования к проектируемой системе авторизации. </text:p>
        </text:list-item>
        <text:list-item>
          <text:p text:style-name="P9">Спроектировать реляционную структуру базы данных, адаптированную для надежного и безопасного хранения учетных записей пользователей. </text:p>
        </text:list-item>
        <text:list-item>
          <text:p text:style-name="P9">Реализовать программный функционал регистрации учетных записей, процедуру аутентификации (входа) и деавторизации (выхода из системы). </text:p>
        </text:list-item>
        <text:list-item>
          <text:p text:style-name="P9">Обеспечить высокий уровень безопасности хранения учетных записей с помощью однонаправленного криптографического хеширования паролей. </text:p>
        </text:list-item>
        <text:list-item>
          <text:p text:style-name="P9">Провести комплексное интеграционное и сквозное (End-to-End) тестирование разработанного модуля. </text:p>
        </text:list-item>
        <text:list-item>
          <text:p text:style-name="P10">Оформить отчетную документацию по выполненной работе согласно требованиям стандартов. </text:p>
        </text:list-item>
      </text:list>
      <text:p text:style-name="Heading_20_1"><text:soft-page-break/>Глава 1. Анализ требований к системе авторизации</text:p>
      <text:p text:style-name="Text_20_body">В ходе проектирования архитектуры системы были детально изучены и формализованы требования к разрабатываемому модулю авторизации. Требования разделены на функциональные и нефункциональные категории.</text:p>
      <text:h text:style-name="Heading_20_2" text:outline-level="2">1.1. Функциональные требования</text:h>
      <text:p text:style-name="Text_20_body">С точки зрения конечного пользователя и внешних интеграционных интерфейсов, разработанный модуль должен предоставлять следующий функциональный объем:</text:p>
      <text:list text:style-name="L2">
        <text:list-item>
          <text:p text:style-name="P11">Регистрация пользователя: создание новой учетной записи с обязательной валидацией уникальности имени пользователя (логина) и автоматической генерацией профильных параметров (системного UUID и персонального графического аватара). </text:p>
        </text:list-item>
        <text:list-item>
          <text:p text:style-name="P11">Аутентификация (вход в систему): проверка подлинности предоставленного логина и пароля с последующей генерацией уникального сессионного контекста и выпуском пары JWT токенов (Access Token и Refresh Token). </text:p>
        </text:list-item>
        <text:list-item>
          <text:p text:style-name="P11">Деавторизация (выход из системы): завершение активного сессионного сеанса пользователя путем принудительного удаления выданных токенов из защищенных куки-файлов браузера. </text:p>
        </text:list-item>
        <text:list-item>
          <text:p text:style-name="P12">Контроль доступа к ресурсам: автоматическая проверка валидности предъявленного Access Token при обращении к защищенным конечным точкам (endpoints) системы. </text:p>
        </text:list-item>
      </text:list>
      <text:h text:style-name="Heading_20_2" text:outline-level="2">1.2. Нефункциональные требования</text:h>
      <text:p text:style-name="Text_20_body">Нефункциональные требования определяют качественные характеристики работы системы и ее эксплуатационные показатели:</text:p>
      <text:list text:style-name="L3">
        <text:list-item>
          <text:p text:style-name="P13">Безопасность данных: запрет на хранение паролей в открытом виде, использование криптостойких алгоритмов хеширования, защита передаваемых токенов от перехвата и межсайтовых атак (XSS, CSRF). </text:p>
        </text:list-item>
        <text:list-item>
          <text:p text:style-name="P13">Масштабируемость: возможность горизонтального масштабирования отдельных компонентов системы (микросервисов) независимо друг от друга в зависимости от текущей нагрузки на сеть или базу данных. </text:p>
        </text:list-item>
        <text:list-item>
          <text:p text:style-name="P13">Отказоустойчивость: способность системы корректно обрабатывать кратковременные сетевые сбои, таймауты и недоступность отдельных смежных сервисов без полной деградации функционала (например, автоматический повтор запросов при потере соединения). </text:p>
        </text:list-item>
        <text:list-item>
          <text:p text:style-name="P14">Производительность: минимальное время задержки (latency) при обработке запросов авторизации за счет использования бинарного протокола gRPC для межсервисного обмена. </text:p>
        </text:list-item>
      </text:list>
      <text:p text:style-name="Heading_20_1"><text:soft-page-break/>Глава 2. Проектирование структуры базы данных</text:p>
      <text:p text:style-name="Text_20_body">Для обеспечения надежного и безопасного хранения учетных записей пользователей спроектирована схема базы данных на базе реляционной СУБД PostgreSQL. Выбор реляционной СУБД обусловлен строгими требованиями к целостности данных, поддержкой транзакционности (ACID) и возможностью построения уникальных ограничений.</text:p>
      <text:h text:style-name="Heading_20_2" text:outline-level="2">2.1. Спецификация таблицы пользователей</text:h>
      <text:p text:style-name="Text_20_body">Основным элементом хранения является таблица users. Ниже представлена детальная структура спроектированной таблицы:</text:p>
      <text:p text:style-name="P15">Таблица 1 – Структура таблицы пользователей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Имя поля</text:p>
            </table:table-cell>
            <table:table-cell table:style-name="Table1.A1" office:value-type="string">
              <text:p text:style-name="Table_20_Heading">Тип данных</text:p>
            </table:table-cell>
            <table:table-cell table:style-name="Table1.A1" office:value-type="string">
              <text:p text:style-name="Table_20_Heading">Ограничения</text:p>
            </table:table-cell>
            <table:table-cell table:style-name="Table1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UUID</text:p>
          </table:table-cell>
          <table:table-cell table:style-name="Table1.A1" office:value-type="string">
            <text:p text:style-name="Table_20_Contents">PRIMARY KEY, NOT NULL</text:p>
          </table:table-cell>
          <table:table-cell table:style-name="Table1.A1" office:value-type="string">
            <text:p text:style-name="Table_20_Contents">Глобально уникальный системный идентификатор пользователя. Применение UUID исключает возможность подбора ID злоумышленником.</text:p>
          </table:table-cell>
        </table:table-row>
        <table:table-row>
          <table:table-cell table:style-name="Table1.A1" office:value-type="string">
            <text:p text:style-name="Table_20_Contents">login</text:p>
          </table:table-cell>
          <table:table-cell table:style-name="Table1.A1" office:value-type="string">
            <text:p text:style-name="Table_20_Contents">VARCHAR(30)</text:p>
          </table:table-cell>
          <table:table-cell table:style-name="Table1.A1" office:value-type="string">
            <text:p text:style-name="Table_20_Contents">UNIQUE, NOT NULL</text:p>
          </table:table-cell>
          <table:table-cell table:style-name="Table1.A1" office:value-type="string">
            <text:p text:style-name="Table_20_Contents">Имя пользователя для входа. Уникальность контролируется на уровне СУБД с помощью уникального индекса.</text:p>
          </table:table-cell>
        </table:table-row>
        <table:table-row>
          <table:table-cell table:style-name="Table1.A1" office:value-type="string">
            <text:p text:style-name="Table_20_Contents">passwordHash</text:p>
          </table:table-cell>
          <table:table-cell table:style-name="Table1.A1" office:value-type="string">
            <text:p text:style-name="Table_20_Contents">VARCHAR</text:p>
          </table:table-cell>
          <table:table-cell table:style-name="Table1.A1" office:value-type="string">
            <text:p text:style-name="Table_20_Contents">NOT NULL</text:p>
          </table:table-cell>
          <table:table-cell table:style-name="Table1.A1" office:value-type="string">
            <text:p text:style-name="Table_20_Contents">Криптографический однонаправленный хэш пароля пользователя, полученный с помощью алгоритма Argon2.</text:p>
          </table:table-cell>
        </table:table-row>
        <table:table-row>
          <table:table-cell table:style-name="Table1.A1" office:value-type="string">
            <text:p text:style-name="Table_20_Contents">avatarUrl</text:p>
          </table:table-cell>
          <table:table-cell table:style-name="Table1.A1" office:value-type="string">
            <text:p text:style-name="Table_20_Contents">VARCHAR</text:p>
          </table:table-cell>
          <table:table-cell table:style-name="Table1.A1" office:value-type="string">
            <text:p text:style-name="Table_20_Contents">NOT NULL, DEFAULT ''</text:p>
          </table:table-cell>
          <table:table-cell table:style-name="Table1.A1" office:value-type="string">
            <text:p text:style-name="Table_20_Contents">Ссылка на сгенерированный графический аватар пользователя в формате SVG Data URI.</text:p>
          </table:table-cell>
        </table:table-row>
      </table:table>
      <text:h text:style-name="Heading_20_2" text:outline-level="2">2.2. Архитектурное разделение репозиториев (CQRS)</text:h>
      <text:p text:style-name="Text_20_body">В соответствии с паттерном Command Query Responsibility Segregation (CQRS), в инфраструктурном слое базы данных произошло четкое разделение операций изменения состояния (запись) и получения данных (чтение):</text:p>
      <text:list text:style-name="L4">
        <text:list-item>
          <text:p text:style-name="P16">Модель записи (Write Model). Реализуется классом UserWriteRepository. Он работает непосредственно с доменной моделью агрегата User, контролирует доменные инварианты и бизнес-логику. При сохранении доменный агрегат проецируется на сущность TypeORM UserOrmEntity с помощью специализированного класса-маппера UserMapper.fromDomainToOrm. Это обеспечивает полную и надежную изоляцию доменной бизнес-логики от деталей ORM-фреймворка. </text:p>
        </text:list-item>
        <text:list-item>
          <text:p text:style-name="P17">Модель чтения (Read Model). Реализуется классом UserReadRepository. В целях оптимизации производительности при операциях чтения доменная модель не конструируется. Вместо этого с помощью TypeORM QueryBuilder выполняются быстрые и легкие SQL-запросы напрямую к таблице users. Результаты запросов напрямую преобразуются в плоские объекты представлений (Read Models), такие как UserReadModel и CredentialsReadModel, минуя слой маппинга доменных сущностей. Это значительно снижает нагрузку на оперативную память при массовых выборках. </text:p>
        </text:list-item>
      </text:list>
      <text:p text:style-name="Heading_20_1"><text:soft-page-break/>Глава 3. Подробное описание микросервиса API Gateway</text:p>
      <text:p text:style-name="Text_20_body">Микросервис API Gateway выступает в качестве единой точки входа (Reverse Proxy и Facade) для всех внешних клиентов. Он скрывает внутреннюю распределенную структуру микросервисов, предоставляя внешнему миру унифицированное RESTful API.</text:p>
      <text:h text:style-name="Heading_20_2" text:outline-level="2">3.1. Назначение и функциональный объем</text:h>
      <text:p text:style-name="Text_20_body">Шлюз реализован на базе NestJS с использованием Express в качестве HTTP-сервера. Он выполняет следующие основные задачи:</text:p>
      <text:list text:style-name="L5">
        <text:list-item>
          <text:p text:style-name="P18">Преобразование внешних HTTP-запросов (REST) во внутренние бинарные gRPC-вызовы к микросервисам auth-service и user-service. </text:p>
        </text:list-item>
        <text:list-item>
          <text:p text:style-name="P18">Входная валидация данных с помощью встроенных декораторов валидации и глобального ValidationPipe с параметрами автоматической трансформации типов (transform: true). </text:p>
        </text:list-item>
        <text:list-item>
          <text:p text:style-name="P18">Управление сессионными Cookies (извлечение и установка токенов доступа с помощью библиотеки cookie-parser). </text:p>
        </text:list-item>
        <text:list-item>
          <text:p text:style-name="P19">Авторизация запросов с помощью NestJS-гардов (класс AccessGuard), блокирующих неавторизованный доступ к защищенным эндпоинтам. </text:p>
        </text:list-item>
      </text:list>
      <text:h text:style-name="Heading_20_2" text:outline-level="2">3.2. Архитектурное решение: Динамическое кэширование открытого ключа RS256</text:h>
      <text:p text:style-name="Text_20_body">Для подписи и проверки подлинности токенов авторизации в системе применен криптографический асимметричный алгоритм RS256. В целях исключения жесткой привязки ключей (hardcode) на шлюзе и упрощения процесса их ротации, была реализована динамическая схема получения открытого ключа по сети:</text:p>
      <text:p text:style-name="P20">При инициализации JWT-стратегии проверки токенов (класс AccesStrategy) шлюз регистрирует провайдер SecretOrKeyProvider. При поступлении первого запроса, содержащего токен, стратегия выполняет gRPC-запрос к микросервису авторизации, получает актуальный открытый PEM-ключ и кэширует его в локальной переменной. Все последующие запросы валидируются на основе кэшированного ключа без повторных сетевых вызовов, что полностью исключает накладные расходы. </text:p>
      <text:h text:style-name="Heading_20_2" text:outline-level="2">3.3. Трансляция и декодирование gRPC-ошибок (RFC 7807)</text:h>
      <text:p text:style-name="Text_20_body">Поскольку gRPC возвращает ограниченный список стандартных кодов ошибок, а клиентам шлюза необходимо возвращать структурированные сообщения о бизнес-ошибках (например, «Пароль не совпадает» или «Данный логин уже занят»), на шлюзе внедрен глобальный фильтр исключений GrpcProblemDetailsExceptionFilter. Он выполняет парсинг бинарного буфера из метаданных gRPC (поле problem-details-bin), преобразует его в JSON-объект стандарта RFC 7807 и отдает его клиенту с соответствующим HTTP-статусом.</text:p>
      <text:p text:style-name="Heading_20_1"><text:soft-page-break/>Глава 4. Подробное описание микросервиса Auth Service</text:p>
      <text:p text:style-name="Text_20_body">Микросервис Auth Service является ядром подсистемы безопасности и авторизации. Он спроектирован как изолированный gRPC-сервер, не имеющий прямого доступа к базе данных пользователей и общающийся исключительно по контрактам gRPC.</text:p>
      <text:h text:style-name="Heading_20_2" text:outline-level="2">4.1. Декларативные пайплайны на базе Effect-ts</text:h>
      <text:p text:style-name="Text_20_body">Для обеспечения высокого уровня отказоустойчивости при межсервисном общении, логика авторизации в обработчике команды LoginPasswordHandler построена по правилам функционального программирования с использованием библиотеки Effect-ts. Использование монадических контейнеров Effect позволило избавиться от императивного кода и декларативно описать логику работы:</text:p>
      <text:p text:style-name="Preformatted_20_Text">const exit = await pipe(</text:p>
      <text:p text:style-name="Preformatted_20_Text"><text:s text:c="2"/>Effect.tryPromise({</text:p>
      <text:p text:style-name="Preformatted_20_Text"><text:s text:c="4"/>try: () =&gt; this.userClient.getCredentialsByLogin(command.login),</text:p>
      <text:p text:style-name="Preformatted_20_Text"><text:s text:c="4"/>catch: (error: any) =&gt; new UserServiceUnavailableException()</text:p>
      <text:p text:style-name="Preformatted_20_Text"><text:s text:c="2"/>}),</text:p>
      <text:p text:style-name="Preformatted_20_Text"><text:s text:c="2"/>Effect.timeout('3 seconds'),</text:p>
      <text:p text:style-name="Preformatted_20_Text"><text:s text:c="2"/>Effect.retry({</text:p>
      <text:p text:style-name="Preformatted_20_Text"><text:s text:c="4"/>times: 2,</text:p>
      <text:p text:style-name="Preformatted_20_Text"><text:s text:c="4"/>while: (error) =&gt; error instanceof UserServiceUnavailableException</text:p>
      <text:p text:style-name="Preformatted_20_Text"><text:s text:c="2"/>}),</text:p>
      <text:p text:style-name="Preformatted_20_Text"><text:s text:c="2"/>Effect.map((cred) =&gt; AuthUser.restore(cred.id, cred.login, cred.passwordHash)),</text:p>
      <text:p text:style-name="Preformatted_20_Text"><text:s text:c="2"/>Effect.flatMap((user) =&gt; this.verifyPasswordAndGenerateTokens(user)),</text:p>
      <text:p text:style-name="Preformatted_20_Text"><text:s text:c="2"/>Effect.runPromiseExit</text:p>
      <text:p text:style-name="Preformatted_20_Text">);</text:p>
      <text:p text:style-name="Text_20_body">Такой подход гарантирует автоматическое повторение сетевых запросов к user-service (до 2 раз с таймаутом ожидания в 3 секунды) в случае кратковременных сбоев связи, обеспечивая высокую стабильность модуля авторизации.</text:p>
      <text:h text:style-name="Heading_20_2" text:outline-level="2">4.2. Генерация токенов и асимметричное шифрование</text:h>
      <text:p text:style-name="Text_20_body">Сервис авторизации владеет приватным ключом шифрования и отвечает за генерацию токенов. При успешном входе генерируется два токена:</text:p>
      <text:list text:style-name="L6">
        <text:list-item>
          <text:p text:style-name="P21">Access Token: содержит идентификатор пользователя и метаданные сессии. Срок действия ограничен 1 часом. Подписывается закрытым ключом алгоритма RS256. </text:p>
        </text:list-item>
        <text:list-item>
          <text:p text:style-name="P22">Refresh Token: предназначен для обновления Access Token без повторного ввода логина и пароля. Срок действия также равен 1 часу. </text:p>
        </text:list-item>
      </text:list>
      <text:p text:style-name="Heading_20_1"><text:soft-page-break/>Глава 5. Подробное описание микросервиса User Service</text:p>
      <text:p text:style-name="Text_20_body">Микросервис User Service отвечает за управление учетными записями пользователей и является единственным владельцем базы данных PostgreSQL в соответствии с паттерном «Solo Microservice».</text:p>
      <text:h text:style-name="Heading_20_2" text:outline-level="2">5.1. Доменная модель и инкапсуляция логики (DDD)</text:h>
      <text:p text:style-name="Text_20_body">Модуль спроектирован с упором на предметно-ориентированное проектирование. Логика сущности сосредоточена в классе User (доменная модель в domain/user.model.ts). Все изменяемые поля домена обернуты в объекты-значения (Value Objects):</text:p>
      <text:list text:style-name="L7">
        <text:list-item>
          <text:p text:style-name="P23">UserLogin — отвечает за валидацию логина (проверка длины от 3 до 30 символов, отсутствие запрещенных знаков). </text:p>
        </text:list-item>
        <text:list-item>
          <text:p text:style-name="P23">UserPassword — инкапсулирует работу с хэшем пароля, исключая случайное чтение пароля в открытом виде. </text:p>
        </text:list-item>
        <text:list-item>
          <text:p text:style-name="P24">UserAvatar — валидирует URL-ссылку на аватар. </text:p>
        </text:list-item>
      </text:list>
      <text:h text:style-name="Heading_20_2" text:outline-level="2">5.2. Генерация аватаров профиля на базе Dicebear API</text:h>
      <text:p text:style-name="Text_20_body">При регистрации нового пользователя инфраструктурный генератор UserAvatarGenerator автоматически создает уникальное изображение профиля. Для этого используется библиотека @dicebear/core со стилем identicon. В качестве инициализирующего значения (seed) для генерации используется логин пользователя, что гарантирует уникальность и воспроизводимость аватара для каждой учетной записи. Сгенерированное изображение сохраняется в базу данных в виде SVG-строки.</text:p>
      <text:p text:style-name="Heading_20_1"><text:soft-page-break/>Глава 6. Обеспечение безопасности хранения паролей и сессий</text:p>
      <text:p text:style-name="Text_20_body">В разработанной системе безопасности уделено повышенное внимание. Все криптографические и авторизационные механизмы соответствуют современным стандартам индустрии.</text:p>
      <text:h text:style-name="Heading_20_2" text:outline-level="2">6.1. Однонаправленное хеширование паролей (Argon2id)</text:h>
      <text:p text:style-name="Text_20_body">Пароли пользователей ни при каких обстоятельствах не сохраняются в базу данных в открытом виде. Для защиты от компрометации базы данных применяется алгоритм хеширования Argon2id (стандарт библиотеки argon2):</text:p>
      <text:list text:style-name="L8">
        <text:list-item>
          <text:p text:style-name="P25">Алгоритм Argon2id устойчив к параллельным вычислениям на GPU/ASIC благодаря контролируемому использованию оперативной памяти при генерации хэша. </text:p>
        </text:list-item>
        <text:list-item>
          <text:p text:style-name="P25">К каждому паролю автоматически добавляется уникальная случайная соль, что полностью исключает атаки по заранее вычисленным таблицам (радужным таблицам). </text:p>
        </text:list-item>
        <text:list-item>
          <text:p text:style-name="P26">Параметры сложности подобранны таким образом, чтобы хеширование занимало около 100-200 миллисекунд, что делает перебор паролей методом «грубой силы» (brute-force) экономически нецелесообразным для злоумышленника. </text:p>
        </text:list-item>
      </text:list>
      <text:h text:style-name="Heading_20_2" text:outline-level="2">6.2. Безопасность транспортного уровня сессий</text:h>
      <text:p text:style-name="Text_20_body">После прохождения аутентификации шлюз api-gateway передает токены клиенту через заголовки HTTP Set-Cookie. Для предотвращения перехвата и кражи токенов используются следующие параметры:</text:p>
      <text:list text:style-name="L9">
        <text:list-item>
          <text:p text:style-name="P27">Флаг HttpOnly: запрещает доступ к куки-файлам из скриптов на стороне клиента (защита от XSS-атак). </text:p>
        </text:list-item>
        <text:list-item>
          <text:p text:style-name="P27">Флаг SameSite: Lax: ограничивает передачу куки при межсайтовых запросах, предотвращая атаки типа CSRF. </text:p>
        </text:list-item>
        <text:list-item>
          <text:p text:style-name="P28">Флаг Secure: активируется в продакшн-окружении, разрешая передачу токенов только по зашифрованному протоколу HTTPS. </text:p>
        </text:list-item>
      </text:list>
      <text:p text:style-name="Heading_20_1"><text:soft-page-break/>Глава 7. Тестирование разработанного модуля</text:p>
      <text:p text:style-name="Text_20_body">Для проверки корректности функционирования модуля авторизации и его стабильности было проведено комплексное интеграционное и сквозное (End-to-End) тестирование.</text:p>
      <text:h text:style-name="Heading_20_2" text:outline-level="2">7.1. Сценарии E2E тестирования</text:h>
      <text:p text:style-name="Text_20_body">В рамках E2E-тестов монорепозитория Nx были автоматизированы следующие сценарии:</text:p>
      <text:list text:style-name="L10">
        <text:list-item>
          <text:p text:style-name="P29">Сценарий успешной регистрации. Отправка запроса на создание пользователя. Проверка генерации UUID, корректного сохранения хэша в БД и успешного вызова Dicebear генератора аватаров. </text:p>
        </text:list-item>
        <text:list-item>
          <text:p text:style-name="P29">Сценарий валидации логина. Попытка регистрации с занятым или слишком коротким логином. Ожидается ошибка 400 Bad Request с подробным описанием нарушения правил. </text:p>
        </text:list-item>
        <text:list-item>
          <text:p text:style-name="P29">Сценарий успешного входа. Отправка корректных учетных данных. Ожидается получение ответа со статусом success и установка сессионных Cookies в HTTP-ответе. </text:p>
        </text:list-item>
        <text:list-item>
          <text:p text:style-name="P29">Сценарий входа с неверным паролем. Попытка авторизации с некорректным паролем. Ожидается ответ 401 Unauthorized. </text:p>
        </text:list-item>
        <text:list-item>
          <text:p text:style-name="P29">Сценарий проверки защищенного доступа. Обращение к роуту api/auth/test-protected. Без Cookies ожидается отказ 401. При наличии валидного Access Token в Cookie ожидается успешный доступ и возврат данных авторизованного пользователя. </text:p>
        </text:list-item>
        <text:list-item>
          <text:p text:style-name="P30">Сценарий выхода из системы. Вызов эндпоинта деавторизации. Проверка очистки кук в браузере клиента. </text:p>
        </text:list-item>
      </text:list>
      <text:p text:style-name="Text_20_body">Все тесты завершились успешно, подтвердив стабильность и защищенность разработанного программного обеспечения.</text:p>
      <text:p text:style-name="Heading_20_1"><text:soft-page-break/>Заключение</text:p>
      <text:p text:style-name="Text_20_body">В ходе выполнения курсового проекта были успешно реализованы все поставленные задачи:</text:p>
      <text:list text:style-name="L11">
        <text:list-item>
          <text:p text:style-name="P31">Проведен детальный анализ функциональных и нефункциональных требований к системе контроля доступа. </text:p>
        </text:list-item>
        <text:list-item>
          <text:p text:style-name="P31">Разработана реляционная структура хранения данных пользователей на базе СУБД PostgreSQL с использованием TypeORM ORM. </text:p>
        </text:list-item>
        <text:list-item>
          <text:p text:style-name="P31">Спроектирована и реализована микросервисная архитектура взаимодействия (API Gateway, Auth Service, User Service) по gRPC протоколу. </text:p>
        </text:list-item>
        <text:list-item>
          <text:p text:style-name="P31">Обеспечена надежная защита учетных записей за счет применения алгоритма хеширования Argon2 и асимметричной JWT-авторизации RS256. </text:p>
        </text:list-item>
        <text:list-item>
          <text:p text:style-name="P31">Проведено автоматическое сквозное тестирование сценариев регистрации, входа и проверки прав доступа. </text:p>
        </text:list-item>
        <text:list-item>
          <text:p text:style-name="P32">Подготовлена детальная отчетная документация по проекту. </text:p>
        </text:list-item>
      </text:list>
      <text:p text:style-name="Text_20_body">Разработанный модуль авторизации отвечает всем современным требованиям к безопасности и отказоустойчивости распределенных систем и готов к интеграции в промышленные веб-прилож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, 'Liberation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, 'Liberation Serif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Tahoma" style:font-size-asian="12pt" style:language-asian="zh" style:country-asian="CN" style:font-name-complex="Free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000000" loext:opacity="100%" style:font-name="Times New Roman" fo:font-family="'Times New Roman', 'Liberation Serif', serif" fo:font-size="14pt" style:font-name-asian="Times New Roman" style:font-family-asian="'Times New Roman', 'Liberation Serif', serif" style:font-size-asian="14pt" style:font-name-complex="Times New Roman" style:font-family-complex="'Times New Roman', 'Liberation Serif', serif" style:font-size-complex="14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line-height="120%" fo:text-align="start" style:justify-single-word="false"/>
      <style:text-properties fo:font-size="12pt" style:font-size-asian="12pt" style:font-size-complex="12pt"/>
    </style:style>
    <style:style style:name="Heading_20_1" style:display-name="Heading 1" style:family="paragraph" style:parent-style-name="Heading" style:next-style-name="Text_20_body" style:class="chapter">
      <style:paragraph-properties fo:margin-top="0.3126in" fo:margin-bottom="0.1563in" style:contextual-spacing="false" fo:line-height="130%" fo:text-align="justify" style:justify-single-word="false" fo:text-indent="0.4925in" style:auto-text-indent="false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252in" style:contextual-spacing="false" fo:line-height="150%" fo:text-align="justify" style:justify-single-word="false" fo:text-indent="0.4925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2291in" fo:margin-bottom="0.1252in" style:contextual-spacing="false" fo:line-height="130%" fo:text-align="justify" style:justify-single-word="false" fo:text-indent="0.4925in" style:auto-text-indent="false"/>
      <style:text-properties fo:color="#000000" loext:opacity="100%"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1874in" fo:margin-bottom="0.0835in" style:contextual-spacing="false" fo:line-height="130%" fo:text-align="justify" style:justify-single-word="false" fo:text-indent="0.4925in" style:auto-text-indent="false"/>
      <style:text-properties fo:color="#000000" loext:opacity="100%" style:font-name="Liberation Serif" fo:font-family="'Liberation Serif'" style:font-family-generic="roman" style:font-pitch="variable" fo:font-size="14pt" fo:font-style="italic" fo:font-weight="normal" style:font-name-asian="Tahoma" style:font-family-asian="Tahoma" style:font-family-generic-asian="system" style:font-pitch-asian="variable" style:font-size-asian="14pt" style:font-style-asian="italic" style:font-weight-asian="normal" style:font-name-complex="FreeSans1" style:font-family-complex="FreeSans" style:font-family-generic-complex="system" style:font-pitch-complex="variable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.0626in" fo:margin-bottom="0.1252in" style:contextual-spacing="false" fo:line-height="114%" fo:padding="0.1043in" fo:border="0.06pt solid #cccccc"/>
      <style:text-properties style:font-name="Courier New" fo:font-family="'Courier New', 'Liberation Mono', monospace" fo:font-size="11pt" style:font-name-asian="Courier New" style:font-family-asian="'Courier New', 'Liberation Mono', monospace" style:font-size-asian="11pt" style:font-name-complex="Courier New" style:font-family-complex="'Courier New', 'Liberation Mono', monospace" style:font-size-complex="11pt"/>
    </style:style>
    <style:style style:name="Table_20_Heading" style:display-name="Table Heading" style:family="paragraph" style:parent-style-name="Table_20_Contents" style:class="extra">
      <style:paragraph-properties fo:line-height="120%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, 'Liberation Mono', monospace" fo:font-size="11pt" fo:background-color="#f5f5f5" style:font-name-asian="Courier New" style:font-family-asian="'Courier New', 'Liberation Mono', monospace" style:font-size-asian="11pt" style:font-name-complex="Courier New" style:font-family-complex="'Courier New', 'Liberation Mono', monospace" style:font-size-complex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Отчет по курсовому проекту: Разработка модуля авторизации пользователей</dc:title>
    <meta:document-statistic meta:table-count="1" meta:image-count="0" meta:object-count="0" meta:page-count="10" meta:paragraph-count="142" meta:word-count="1853" meta:character-count="15998" meta:non-whitespace-character-count="14245"/>
    <meta:generator>LibreOffice/25.2.6.2$Linux_X86_64 LibreOffice_project/520$Build-2</meta:generator>
    <meta:user-defined meta:name=""/>
  </office:meta>
</office:document-meta>
</file>